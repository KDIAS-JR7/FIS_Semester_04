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084b5" officeooo:paragraph-rsid="001084b5"/>
    </style:style>
    <style:style style:name="P2" style:family="paragraph" style:parent-style-name="Standard">
      <style:text-properties officeooo:rsid="000e9010" officeooo:paragraph-rsid="000e9010"/>
    </style:style>
    <style:style style:name="P3" style:family="paragraph" style:parent-style-name="Standard" style:list-style-name="L1">
      <style:text-properties officeooo:rsid="000e9010" officeooo:paragraph-rsid="000e9010"/>
    </style:style>
    <style:style style:name="P4" style:family="paragraph" style:parent-style-name="Standard" style:list-style-name="L2">
      <style:text-properties officeooo:rsid="000e9010" officeooo:paragraph-rsid="000e9010"/>
    </style:style>
    <style:style style:name="P5" style:family="paragraph" style:parent-style-name="Standard" style:list-style-name="L2">
      <style:text-properties officeooo:rsid="001084b5" officeooo:paragraph-rsid="001084b5"/>
    </style:style>
    <style:style style:name="P6" style:family="paragraph" style:parent-style-name="Table_20_Contents">
      <style:text-properties officeooo:rsid="001084b5" officeooo:paragraph-rsid="001084b5"/>
    </style:style>
    <style:style style:name="P7" style:family="paragraph" style:parent-style-name="Table_20_Contents">
      <style:text-properties officeooo:rsid="001184aa" officeooo:paragraph-rsid="001184aa"/>
    </style:style>
    <style:style style:name="P8" style:family="paragraph" style:parent-style-name="Standard">
      <style:text-properties officeooo:rsid="001184aa" officeooo:paragraph-rsid="001184aa"/>
    </style:style>
    <style:style style:name="P9" style:family="paragraph" style:parent-style-name="Standard" style:list-style-name="L3">
      <style:text-properties officeooo:rsid="001184aa" officeooo:paragraph-rsid="001184aa"/>
    </style:style>
    <style:style style:name="P10" style:family="paragraph" style:parent-style-name="Standard" style:list-style-name="L3">
      <style:text-properties officeooo:paragraph-rsid="001184aa"/>
    </style:style>
    <style:style style:name="P11" style:family="paragraph" style:parent-style-name="Standard" style:list-style-name="L4">
      <style:text-properties officeooo:rsid="001184aa" officeooo:paragraph-rsid="001184aa"/>
    </style:style>
    <style:style style:name="P12" style:family="paragraph" style:parent-style-name="Standard" style:list-style-name="L5">
      <style:text-properties officeooo:rsid="001184aa" officeooo:paragraph-rsid="001184aa"/>
    </style:style>
    <style:style style:name="P13" style:family="paragraph" style:parent-style-name="Standard" style:list-style-name="L6">
      <style:text-properties officeooo:rsid="001184aa" officeooo:paragraph-rsid="001184aa"/>
    </style:style>
    <style:style style:name="P14" style:family="paragraph" style:parent-style-name="Standard">
      <style:text-properties officeooo:rsid="00119be1" officeooo:paragraph-rsid="001184aa"/>
    </style:style>
    <style:style style:name="P15" style:family="paragraph" style:parent-style-name="Standard" style:list-style-name="L7">
      <style:text-properties officeooo:rsid="00119be1" officeooo:paragraph-rsid="00119be1"/>
    </style:style>
    <style:style style:name="P16" style:family="paragraph" style:parent-style-name="Standard">
      <style:text-properties officeooo:rsid="00119be1" officeooo:paragraph-rsid="00119be1"/>
    </style:style>
    <style:style style:name="T1" style:family="text">
      <style:text-properties officeooo:rsid="001084b5"/>
    </style:style>
    <style:style style:name="T2" style:family="text">
      <style:text-properties officeooo:rsid="001184a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1</text:p>
      <text:p text:style-name="P2">1)</text:p>
      <text:p text:style-name="P2">Software architecture is the fundamental design of an entire system comprising the elements</text:p>
      <text:p text:style-name="P2">included in the system, their functions and how they interact with each other. It is the high level</text:p>
      <text:p text:style-name="P2">overview of the entire system and how every component within it works together.</text:p>
      <text:p text:style-name="P2">2)</text:p>
      <text:list text:style-name="L1">
        <text:list-item>
          <text:p text:style-name="P3">The development team achieves higher productivity as the development process has a</text:p>
          <text:p text:style-name="P3">proper, well destined structure and timeline.</text:p>
        </text:list-item>
        <text:list-item>
          <text:p text:style-name="P3">Achieve higher quality software products through careful consideration of needs,</text:p>
          <text:p text:style-name="P3">perspectives as well as capabilities of all stakeholders.</text:p>
        </text:list-item>
        <text:list-item>
          <text:p text:style-name="P3">The development process includes a lower margin of risk as risk management is seen as a core process within a standardized system.</text:p>
        </text:list-item>
      </text:list>
      <text:p text:style-name="P2">3)</text:p>
      <text:list text:style-name="L2">
        <text:list-item>
          <text:p text:style-name="P4">Conflict between developers</text:p>
          <text:list>
            <text:list-item>
              <text:p text:style-name="P4">The developers in charge of different sections of the project or two or more developers from the same section disagree with each other and disrupt each other.</text:p>
              <text:list>
                <text:list-item>
                  <text:p text:style-name="P4">Ex: A front-end developer changes the code another front-end developer wrote, because he thinks the logout button shout be blue instead of red.</text:p>
                </text:list-item>
              </text:list>
            </text:list-item>
          </text:list>
        </text:list-item>
        <text:list-item>
          <text:p text:style-name="P4">Missed deadlines</text:p>
          <text:list>
            <text:list-item>
              <text:p text:style-name="P4">The developers do not have a proper plan, therefore they make a quality software, but miss the deadline, making it a failed endeavor.</text:p>
              <text:list>
                <text:list-item>
                  <text:p text:style-name="P4">Ex: The government commission a software company to c<text:span text:style-name="T1">reate a software to manage a fuel crisis in a week. The team delivers in a month, but the government has already collapsed.</text:span></text:p>
                </text:list-item>
              </text:list>
            </text:list-item>
          </text:list>
        </text:list-item>
        <text:list-item>
          <text:p text:style-name="P5">Over budget</text:p>
          <text:list>
            <text:list-item>
              <text:p text:style-name="P5">The software product is created, but it is over the allowed budget.</text:p>
              <text:list>
                <text:list-item>
                  <text:p text:style-name="P5">Ex: A software development team is commissioned by a small startup. The startup can only afford $100. The team delivers, but the project costed $200.</text:p>
                </text:list-item>
              </text:list>
            </text:list-item>
          </text:list>
        </text:list-item>
      </text:list>
      <text:p text:style-name="P1">Part 2</text:p>
      <text:p text:style-name="P1">4)</text:p>
      <text:p text:style-name="P1">Any individual or party/collection of individuals who have an interest in the software system, including but not limited to developers, maintainers and customers.</text:p>
      <text:p text:style-name="P1"/>
      <text:p text:style-name="P1">5)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Stakeholder</text:p>
          </table:table-cell>
          <table:table-cell table:style-name="Table1.B1" office:value-type="string">
            <text:p text:style-name="P6">Concern</text:p>
          </table:table-cell>
        </table:table-row>
        <table:table-row>
          <table:table-cell table:style-name="Table1.A2" office:value-type="string">
            <text:p text:style-name="P6">Bank</text:p>
          </table:table-cell>
          <table:table-cell table:style-name="Table1.B2" office:value-type="string">
            <text:p text:style-name="P6">Absolute security and near-perfect user verification</text:p>
          </table:table-cell>
        </table:table-row>
        <table:table-row>
          <table:table-cell table:style-name="Table1.A2" office:value-type="string">
            <text:p text:style-name="P6">Bank Customers</text:p>
          </table:table-cell>
          <table:table-cell table:style-name="Table1.B2" office:value-type="string">
            <text:p text:style-name="P6">Perform transactions</text:p>
          </table:table-cell>
        </table:table-row>
        <table:table-row>
          <table:table-cell table:style-name="Table1.A2" office:value-type="string">
            <text:p text:style-name="P6">Software developers</text:p>
          </table:table-cell>
          <table:table-cell table:style-name="Table1.B2" office:value-type="string">
            <text:p text:style-name="P6">Produce a quality software that meets the expectations of all stakeholders or with valid compromises while being on time and not exceeding the allocated budget</text:p>
          </table:table-cell>
        </table:table-row>
        <table:table-row>
          <table:table-cell table:style-name="Table1.A2" office:value-type="string">
            <text:p text:style-name="P7">Internet Service Providers</text:p>
          </table:table-cell>
          <table:table-cell table:style-name="Table1.B2" office:value-type="string">
            <text:p text:style-name="P7">Provide consistent access without overloading total available bandwidth</text:p>
          </table:table-cell>
        </table:table-row>
      </table:table>
      <text:p text:style-name="P1"><text:s/></text:p>
      <text:p text:style-name="P8"/>
      <text:p text:style-name="P8"><text:soft-page-break/>Part 3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">View </text:p>
          </table:table-cell>
          <table:table-cell table:style-name="Table2.B1" office:value-type="string">
            <text:p text:style-name="P7">Description</text:p>
          </table:table-cell>
        </table:table-row>
        <table:table-row>
          <table:table-cell table:style-name="Table2.A2" office:value-type="string">
            <text:p text:style-name="Table_20_Contents">Logical View</text:p>
          </table:table-cell>
          <table:table-cell table:style-name="Table2.B2" office:value-type="string">
            <text:p text:style-name="Table_20_Contents">Focuses on system functionality and objects</text:p>
          </table:table-cell>
        </table:table-row>
        <table:table-row>
          <table:table-cell table:style-name="Table2.A2" office:value-type="string">
            <text:p text:style-name="Table_20_Contents">Process View</text:p>
          </table:table-cell>
          <table:table-cell table:style-name="Table2.B2" office:value-type="string">
            <text:p text:style-name="Table_20_Contents">Focuses on system performance and runtime behavior</text:p>
          </table:table-cell>
        </table:table-row>
        <table:table-row>
          <table:table-cell table:style-name="Table2.A2" office:value-type="string">
            <text:p text:style-name="Table_20_Contents">Development View</text:p>
          </table:table-cell>
          <table:table-cell table:style-name="Table2.B2" office:value-type="string">
            <text:p text:style-name="Table_20_Contents">Focuses on source code organization and modules</text:p>
          </table:table-cell>
        </table:table-row>
        <table:table-row>
          <table:table-cell table:style-name="Table2.A2" office:value-type="string">
            <text:p text:style-name="Table_20_Contents">Physical View</text:p>
          </table:table-cell>
          <table:table-cell table:style-name="Table2.B2" office:value-type="string">
            <text:p text:style-name="Table_20_Contents">Focuses on hardware and deployment environment</text:p>
          </table:table-cell>
        </table:table-row>
      </table:table>
      <text:p text:style-name="P8"/>
      <text:p text:style-name="P8">6)</text:p>
      <text:p text:style-name="P8">classes;</text:p>
      <text:list text:style-name="L3">
        <text:list-item>
          <text:p text:style-name="P9">food</text:p>
        </text:list-item>
        <text:list-item>
          <text:p text:style-name="P9">delivery</text:p>
        </text:list-item>
        <text:list-item>
          <text:p text:style-name="P10"><text:span text:style-name="T2">restaurant</text:span></text:p>
        </text:list-item>
        <text:list-item>
          <text:p text:style-name="P9">paymentOption</text:p>
        </text:list-item>
      </text:list>
      <text:p text:style-name="P8"/>
      <text:p text:style-name="P8">7)</text:p>
      <text:list text:style-name="L4">
        <text:list-item>
          <text:p text:style-name="P11">browsing restaurants</text:p>
        </text:list-item>
        <text:list-item>
          <text:p text:style-name="P11">making payments</text:p>
        </text:list-item>
      </text:list>
      <text:p text:style-name="P8"/>
      <text:p text:style-name="P8">8)</text:p>
      <text:list text:style-name="L5">
        <text:list-item>
          <text:p text:style-name="P12">databases to store restaurant details</text:p>
        </text:list-item>
        <text:list-item>
          <text:p text:style-name="P12">graphical front-end to browse food items</text:p>
        </text:list-item>
        <text:list-item>
          <text:p text:style-name="P12">payment gateway</text:p>
        </text:list-item>
      </text:list>
      <text:p text:style-name="P8"/>
      <text:p text:style-name="P8">9)</text:p>
      <text:list text:style-name="L6">
        <text:list-item>
          <text:p text:style-name="P13">data warehouse</text:p>
        </text:list-item>
        <text:list-item>
          <text:p text:style-name="P13">in house server</text:p>
        </text:list-item>
        <text:list-item>
          <text:p text:style-name="P13">cloud infrastructure ex: AWS</text:p>
        </text:list-item>
      </text:list>
      <text:p text:style-name="P8"/>
      <text:p text:style-name="P8">Part 5</text:p>
      <text:p text:style-name="P14"/>
      <text:list text:style-name="L7">
        <text:list-item>
          <text:p text:style-name="P15">Joe visits the food delivery system and searches a restaurant</text:p>
        </text:list-item>
        <text:list-item>
          <text:p text:style-name="P15">The system queries the database</text:p>
        </text:list-item>
        <text:list-item>
          <text:p text:style-name="P15">Database returns the restaurant if its available, or a ‘not-available’ message otherwise.</text:p>
        </text:list-item>
        <text:list-item>
          <text:p text:style-name="P15">The system relays the message to Joe. If the restaurant is available Joe proceeds to inspect the menu. If not, Joe searches another name.</text:p>
        </text:list-item>
      </text:list>
      <text:p text:style-name="P16"/>
      <text:p text:style-name="P16">10)</text:p>
      <text:p text:style-name="P16">Allows the developer to catch an issue or requirement that is visible in one architectural view, but not in another.</text:p>
      <text:p text:style-name="P16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15:41:50.515760317</meta:creation-date>
    <dc:date>2026-03-12T16:23:39.982307951</dc:date>
    <meta:editing-duration>PT5M57S</meta:editing-duration>
    <meta:editing-cycles>1</meta:editing-cycles>
    <meta:document-statistic meta:table-count="2" meta:image-count="0" meta:object-count="0" meta:page-count="2" meta:paragraph-count="71" meta:word-count="508" meta:character-count="3097" meta:non-whitespace-character-count="2685"/>
    <meta:generator>LibreOffice/25.8.5.2$Linux_X86_64 LibreOffice_project/580$Build-2</meta:generator>
  </office:meta>
</office:document-meta>
</file>